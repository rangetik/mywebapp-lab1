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E30000004C7ADB58ED.png" manifest:media-type="image/png"/>
  <manifest:file-entry manifest:full-path="Pictures/10000001000002DE0000004F2CB4B4CE.png" manifest:media-type="image/png"/>
  <manifest:file-entry manifest:full-path="Pictures/10000001000000DA0000004BE80EB28E.png" manifest:media-type="image/png"/>
  <manifest:file-entry manifest:full-path="Pictures/10000001000002B8000000411DCCFD15.png" manifest:media-type="image/png"/>
  <manifest:file-entry manifest:full-path="Pictures/10000001000000E3000000545F1F6616.png" manifest:media-type="image/png"/>
  <manifest:file-entry manifest:full-path="Pictures/10000001000000DE00000045294FDD63.png" manifest:media-type="image/png"/>
  <manifest:file-entry manifest:full-path="Pictures/10000001000000D100000055E1FDCE24.png" manifest:media-type="image/png"/>
  <manifest:file-entry manifest:full-path="Pictures/10000001000000E30000004F481E0B69.png" manifest:media-type="image/png"/>
  <manifest:file-entry manifest:full-path="Pictures/10000001000003CD000000383ED35D7A.png" manifest:media-type="image/png"/>
  <manifest:file-entry manifest:full-path="Pictures/10000001000000EB000000469C778154.png" manifest:media-type="image/png"/>
  <manifest:file-entry manifest:full-path="Pictures/10000001000003B10000003926A7C706.png" manifest:media-type="image/png"/>
  <manifest:file-entry manifest:full-path="Pictures/10000001000001030000005293732469.png" manifest:media-type="image/png"/>
  <manifest:file-entry manifest:full-path="Pictures/10000001000003350000003DA99C763A.png" manifest:media-type="image/png"/>
  <manifest:file-entry manifest:full-path="Pictures/100000010000030800000139D4D779C1.png" manifest:media-type="image/png"/>
  <manifest:file-entry manifest:full-path="Pictures/10000001000000FD0000004BB85AB8E4.png" manifest:media-type="image/png"/>
  <manifest:file-entry manifest:full-path="Pictures/10000001000001170000014203A208E1.png" manifest:media-type="image/png"/>
  <manifest:file-entry manifest:full-path="Pictures/100000010000031D0000003A021C045C.png" manifest:media-type="image/png"/>
  <manifest:file-entry manifest:full-path="Pictures/10000001000000D70000004D1AA4968F.png" manifest:media-type="image/png"/>
  <manifest:file-entry manifest:full-path="Pictures/10000001000003660000003AA900821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 style:font-pitch="variable"/>
  </office:font-face-decls>
  <office:automatic-styles>
    <style:style style:name="Таблиця1" style:family="table" style:master-page-name="">
      <style:table-properties style:width="16.05cm" style:page-number="auto" fo:break-before="auto" fo:break-after="auto" table:align="left" fo:keep-with-next="auto"/>
    </style:style>
    <style:style style:name="Таблиця1.A" style:family="table-column">
      <style:table-column-properties style:column-width="4.865cm"/>
    </style:style>
    <style:style style:name="Таблиця1.B" style:family="table-column">
      <style:table-column-properties style:column-width="5.124cm"/>
    </style:style>
    <style:style style:name="Таблиця1.C" style:family="table-column">
      <style:table-column-properties style:column-width="6.061cm"/>
    </style:style>
    <style:style style:name="Таблиця1.A1" style:family="table-cell">
      <style:table-cell-properties style:vertical-align="middle" fo:padding-left="0.049cm" fo:padding-right="0.318cm" fo:padding-top="0.318cm" fo:padding-bottom="0.423cm" fo:border="0.05pt solid #000000"/>
    </style:style>
    <style:style style:name="Таблиця1.B1" style:family="table-cell">
      <style:table-cell-properties style:vertical-align="middle" fo:padding-left="0.318cm" fo:padding-right="0.318cm" fo:padding-top="0.318cm" fo:padding-bottom="0.423cm" fo:border="0.05pt solid #000000"/>
    </style:style>
    <style:style style:name="Таблиця1.C1" style:family="table-cell">
      <style:table-cell-properties style:vertical-align="middle" fo:padding-left="0.318cm" fo:padding-right="0.049cm" fo:padding-top="0.318cm" fo:padding-bottom="0.423cm" fo:border="0.05pt solid #000000"/>
    </style:style>
    <style:style style:name="Таблиця1.A2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Таблиця1.B2" style:family="table-cell">
      <style:table-cell-properties style:vertical-align="middle" fo:padding-left="0.318cm" fo:padding-right="0.318cm" fo:padding-top="0.423cm" fo:padding-bottom="0.423cm" fo:border="0.05pt solid #000000"/>
    </style:style>
    <style:style style:name="Таблиця1.C2" style:family="table-cell">
      <style:table-cell-properties style:vertical-align="middle" fo:padding-left="0.318cm" fo:padding-right="0.049cm" fo:padding-top="0.423cm" fo:padding-bottom="0.423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style="normal" fo:font-weight="bold" officeooo:rsid="0001f96c" officeooo:paragraph-rsid="0001f96c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bold" officeooo:rsid="0030858e" officeooo:paragraph-rsid="0030858e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style:use-window-font-color="true" loext:opacity="0%" style:text-line-through-style="none" style:text-line-through-type="none" style:font-name="Times New Roman" fo:font-size="14pt" fo:font-style="normal" style:text-underline-style="none" fo:font-weight="bold" officeooo:rsid="0001f96c" officeooo:paragraph-rsid="0001f96c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Text_20_body">
      <style:text-properties style:font-name="Times New Roman" fo:font-size="14pt" officeooo:rsid="0001f96c" officeooo:paragraph-rsid="0001f96c" style:font-size-asian="14pt" style:font-size-complex="14pt"/>
    </style:style>
    <style:style style:name="P5" style:family="paragraph" style:parent-style-name="Text_20_body">
      <style:text-properties fo:font-variant="normal" fo:text-transform="none" fo:color="#434343" loext:opacity="100%" style:text-line-through-style="none" style:text-line-through-type="none" style:font-name="Times New Roman" fo:font-size="14pt" fo:font-style="normal" style:text-underline-style="none" fo:font-weight="normal" officeooo:rsid="0001f96c" officeooo:paragraph-rsid="0001f96c" style:text-blinking="false" fo:background-color="transparent" style:font-size-asian="14pt" style:font-size-complex="14pt"/>
    </style:style>
    <style:style style:name="P6" style:family="paragraph" style:parent-style-name="Text_20_body">
      <style:text-properties style:font-name="Times New Roman" fo:font-size="14pt" officeooo:rsid="0001f96c" style:font-size-asian="14pt" style:font-size-complex="14pt"/>
    </style:style>
    <style:style style:name="P7" style:family="paragraph" style:parent-style-name="Text_20_body">
      <style:text-properties style:font-name="Times New Roman" fo:font-size="14pt" officeooo:rsid="0001f96c" fo:background-color="#111111" style:font-size-asian="14pt" style:font-size-complex="14pt"/>
    </style:style>
    <style:style style:name="P8" style:family="paragraph" style:parent-style-name="Text_20_body">
      <style:text-properties style:font-name="Times New Roman" fo:font-size="14pt" style:font-size-asian="14pt" style:font-size-complex="14pt"/>
    </style:style>
    <style:style style:name="P9" style:family="paragraph" style:parent-style-name="Text_20_body">
      <style:text-properties style:use-window-font-color="true" loext:opacity="0%" style:font-name="Times New Roman" fo:font-size="14pt" style:font-size-asian="14pt" style:font-size-complex="14pt"/>
    </style:style>
    <style:style style:name="P10" style:family="paragraph" style:parent-style-name="Text_20_body">
      <style:text-properties style:use-window-font-color="true" loext:opacity="0%" style:font-name="Times New Roman" fo:font-size="14pt" officeooo:paragraph-rsid="00102cad" style:font-size-asian="14pt" style:font-size-complex="14pt"/>
    </style:style>
    <style:style style:name="P11" style:family="paragraph" style:parent-style-name="Text_20_body">
      <style:text-properties style:font-name="Times New Roman" fo:font-size="14pt" officeooo:rsid="00102cad" officeooo:paragraph-rsid="00102cad" style:font-size-asian="14pt" style:font-size-complex="14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4pt" fo:font-weight="bold" officeooo:paragraph-rsid="00117373" style:font-size-asian="14pt" style:font-size-complex="14pt" loext:padding="0cm" loext:border="non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1f1f1f" loext:opacity="100%" style:font-name="Times New Roman" fo:font-size="14pt" fo:font-weight="normal" officeooo:paragraph-rsid="00117373" style:font-size-asian="14pt" style:font-weight-asian="normal" style:font-size-complex="14pt" style:font-weight-complex="normal" loext:padding="0cm" loext:border="non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1f1f1f" loext:opacity="100%" style:font-name="Times New Roman" fo:font-size="14pt" fo:font-weight="bold" officeooo:paragraph-rsid="00117373" style:font-size-asian="14pt" style:font-size-complex="14pt" loext:padding="0cm" loext:border="none"/>
    </style:style>
    <style:style style:name="P15" style:family="paragraph" style:parent-style-name="Text_20_body">
      <style:text-properties style:font-name="Times New Roman" fo:font-size="14pt" fo:language="uk" fo:country="UA" officeooo:rsid="00117373" officeooo:paragraph-rsid="00117373" style:font-size-asian="14pt" style:font-size-complex="14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1f1f1f" loext:opacity="100%" style:font-name="Google Sans Text" fo:font-weight="bold" officeooo:paragraph-rsid="00117373" loext:padding="0cm" loext:border="none"/>
    </style:style>
    <style:style style:name="P17" style:family="paragraph" style:parent-style-name="Text_20_body">
      <style:text-properties style:font-name="Times New Roman" fo:font-size="14pt" fo:language="uk" fo:country="UA" officeooo:rsid="00117373" officeooo:paragraph-rsid="0012fc40" style:font-size-asian="14pt" style:font-size-complex="14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4pt" fo:font-weight="bold" style:font-size-asian="14pt" style:font-size-complex="14pt" loext:padding="0cm" loext:border="none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4pt" officeooo:rsid="00117373" officeooo:paragraph-rsid="00117373" style:font-size-asian="14pt" style:font-size-complex="14pt" loext:padding="0cm" loext:border="none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4pt" fo:language="en" fo:country="US" officeooo:rsid="00117373" officeooo:paragraph-rsid="00117373" style:font-size-asian="14pt" style:font-size-complex="14pt" loext:padding="0cm" loext:border="none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4pt" fo:language="en" fo:country="US" officeooo:rsid="0012fc40" officeooo:paragraph-rsid="0012fc40" style:font-size-asian="14pt" style:font-size-complex="14pt" loext:padding="0cm" loext:border="non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4pt" officeooo:rsid="0012fc40" officeooo:paragraph-rsid="0012fc40" style:font-size-asian="14pt" style:font-size-complex="14pt" loext:padding="0cm" loext:border="none"/>
    </style:style>
    <style:style style:name="P24" style:family="paragraph" style:parent-style-name="Text_20_body">
      <style:text-properties style:font-name="Times New Roman" fo:font-size="14pt" fo:font-weight="normal" officeooo:rsid="00102cad" officeooo:paragraph-rsid="0014d575" style:font-size-asian="14pt" style:font-weight-asian="normal" style:font-size-complex="14pt" style:font-weight-complex="normal"/>
    </style:style>
    <style:style style:name="P25" style:family="paragraph" style:parent-style-name="Text_20_body">
      <style:text-properties style:font-name="Times New Roman" fo:font-size="14pt" officeooo:rsid="00102cad" officeooo:paragraph-rsid="0014d575" style:font-size-asian="14pt" style:font-size-complex="14pt"/>
    </style:style>
    <style:style style:name="P26" style:family="paragraph" style:parent-style-name="Text_20_body">
      <style:text-properties style:font-name="Times New Roman" fo:font-size="14pt" fo:font-weight="normal" officeooo:rsid="00102cad" style:font-size-asian="14pt" style:font-weight-asian="normal" style:font-size-complex="14pt" style:font-weight-complex="normal"/>
    </style:style>
    <style:style style:name="P27" style:family="paragraph" style:parent-style-name="Heading_20_3">
      <style:text-properties fo:font-variant="normal" fo:text-transform="none" fo:color="#434343" loext:opacity="100%" style:text-line-through-style="none" style:text-line-through-type="none" style:font-name="Roboto" fo:font-size="14pt" fo:font-style="normal" style:text-underline-style="none" fo:font-weight="normal" officeooo:rsid="00102cad" style:text-blinking="false" fo:background-color="transparent" style:font-size-asian="14pt" style:font-weight-asian="normal" style:font-size-complex="14pt" style:font-weight-complex="normal"/>
    </style:style>
    <style:style style:name="P28" style:family="paragraph" style:parent-style-name="Text_20_body">
      <style:text-properties style:use-window-font-color="true" loext:opacity="0%" style:font-name="Times New Roman" fo:font-size="14pt" fo:font-weight="normal" officeooo:rsid="00102cad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fo:color="#434343" loext:opacity="100%" style:font-name="Roboto" fo:font-size="14pt" officeooo:rsid="00102cad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434343" loext:opacity="100%" style:font-name="Roboto" fo:font-size="14pt" officeooo:rsid="00102cad" officeooo:paragraph-rsid="0018a449" style:font-size-asian="14pt" style:font-size-complex="14pt"/>
    </style:style>
    <style:style style:name="P31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use-window-font-color="true" loext:opacity="0%" style:font-name="Times New Roman" fo:font-size="14pt" fo:font-weight="normal" officeooo:rsid="00102cad" style:font-size-asian="14pt" style:font-weight-asian="normal" style:font-size-complex="14pt" style:font-weight-complex="normal"/>
    </style:style>
    <style:style style:name="P32" style:family="paragraph" style:parent-style-name="Preformatted_20_Text">
      <style:paragraph-properties fo:margin-top="0cm" fo:margin-bottom="0cm" style:contextual-spacing="false" fo:line-height="114%"/>
      <style:text-properties fo:color="#434343" loext:opacity="100%" style:font-name="Roboto" fo:font-size="14pt" officeooo:rsid="00102cad" style:font-size-asian="14pt" style:font-size-complex="14pt"/>
    </style:style>
    <style:style style:name="P33" style:family="paragraph" style:parent-style-name="Preformatted_20_Text">
      <style:paragraph-properties fo:margin-top="0cm" fo:margin-bottom="0cm" style:contextual-spacing="false" fo:line-height="114%"/>
      <style:text-properties style:use-window-font-color="true" loext:opacity="0%" style:font-name="Times New Roman" fo:font-size="14pt" fo:font-weight="normal" officeooo:rsid="00102cad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use-window-font-color="true" loext:opacity="0%" style:font-name="Times New Roman" fo:font-size="14pt" fo:font-weight="normal" officeooo:rsid="00102cad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434343" loext:opacity="100%" style:font-name="Roboto" fo:font-size="14pt" officeooo:rsid="00102cad" style:font-size-asian="14pt" style:font-size-complex="14pt"/>
    </style:style>
    <style:style style:name="P36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Times New Roman" fo:font-size="14pt" fo:font-style="normal" style:text-underline-style="none" fo:font-weight="normal" officeooo:rsid="00102cad" style:text-blinking="false" fo:background-color="transparent" style:font-size-asian="14pt" style:font-weight-asian="normal" style:font-size-complex="14pt" style:font-weight-complex="normal"/>
    </style:style>
    <style:style style:name="P37" style:family="paragraph" style:parent-style-name="Heading_20_3">
      <style:text-properties style:use-window-font-color="true" loext:opacity="0%" style:font-name="Times New Roman" fo:font-size="14pt" fo:font-weight="normal" officeooo:rsid="00102cad" style:font-size-asian="14pt" style:font-weight-asian="normal" style:font-size-complex="14pt" style:font-weight-complex="normal"/>
    </style:style>
    <style:style style:name="P38" style:family="paragraph" style:parent-style-name="Text_20_body" style:list-style-name="L1">
      <style:text-properties style:font-name="Times New Roman" fo:font-size="14pt" officeooo:rsid="00102cad" style:font-size-asian="14pt" style:font-size-complex="14pt"/>
    </style:style>
    <style:style style:name="P39" style:family="paragraph" style:parent-style-name="Heading_20_4">
      <style:paragraph-properties fo:margin-top="0cm" fo:margin-bottom="0.247cm" style:contextual-spacing="false" fo:line-height="115%"/>
      <style:text-properties style:use-window-font-color="true" loext:opacity="0%" style:font-name="Times New Roman" fo:font-size="14pt" fo:font-weight="normal" officeooo:rsid="00102cad" style:font-size-asian="14pt" style:font-weight-asian="normal" style:font-size-complex="14pt" style:font-weight-complex="normal"/>
    </style:style>
    <style:style style:name="P40" style:family="paragraph" style:parent-style-name="Text_20_body" style:list-style-name="L2">
      <style:text-properties style:use-window-font-color="true" loext:opacity="0%" style:font-name="Times New Roman" fo:font-size="14pt" fo:font-weight="normal" officeooo:rsid="00102cad" style:font-size-asian="14pt" style:font-weight-asian="normal" style:font-size-complex="14pt" style:font-weight-complex="normal"/>
    </style:style>
    <style:style style:name="P41" style:family="paragraph" style:parent-style-name="Text_20_body" style:list-style-name="L2">
      <style:text-properties style:font-name="Times New Roman" fo:font-size="14pt" officeooo:rsid="00102cad" style:font-size-asian="14pt" style:font-size-complex="14pt"/>
    </style:style>
    <style:style style:name="P42" style:family="paragraph" style:parent-style-name="Text_20_body">
      <style:text-properties style:font-name="Times New Roman" fo:font-size="14pt" officeooo:rsid="00102cad" style:font-size-asian="14pt" style:font-size-complex="14pt"/>
    </style:style>
    <style:style style:name="P43" style:family="paragraph" style:parent-style-name="Heading_20_3">
      <style:text-properties fo:font-variant="normal" fo:text-transform="none" fo:color="#434343" loext:opacity="100%" style:text-line-through-style="none" style:text-line-through-type="none" style:font-name="Roboto" fo:font-size="14pt" fo:language="uk" fo:country="UA" fo:font-style="normal" style:text-underline-style="none" fo:font-weight="normal" officeooo:rsid="001c2d58" officeooo:paragraph-rsid="001c2d58" style:text-blinking="false" fo:background-color="transparent" style:font-size-asian="14pt" style:font-weight-asian="normal" style:font-size-complex="14pt" style:font-weight-complex="normal"/>
    </style:style>
    <style:style style:name="P44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Times New Roman" fo:font-size="14pt" fo:language="en" fo:country="US" fo:font-style="normal" style:text-underline-style="none" fo:font-weight="normal" officeooo:rsid="001cb8ab" officeooo:paragraph-rsid="001cb8ab" style:text-blinking="false" fo:background-color="transparent" style:font-size-asian="14pt" style:font-weight-asian="normal" style:font-size-complex="14pt" style:font-weight-complex="normal"/>
    </style:style>
    <style:style style:name="P45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Times New Roman" fo:font-size="14pt" fo:language="en" fo:country="US" fo:font-style="normal" style:text-underline-style="none" fo:font-weight="normal" officeooo:rsid="001cb8ab" officeooo:paragraph-rsid="00206878" style:text-blinking="false" fo:background-color="transparent" style:font-size-asian="14pt" style:font-weight-asian="normal" style:font-size-complex="14pt" style:font-weight-complex="normal"/>
    </style:style>
    <style:style style:name="P46" style:family="paragraph" style:parent-style-name="Preformatted_20_Text">
      <style:paragraph-properties fo:margin-top="0cm" fo:margin-bottom="0.247cm" style:contextual-spacing="false" fo:line-height="115%"/>
      <style:text-properties style:font-name="Times New Roman" fo:font-size="14pt" fo:language="en" fo:country="US" officeooo:rsid="001cb8ab" officeooo:paragraph-rsid="0021d38d" style:font-size-asian="14pt" style:font-size-complex="14pt"/>
    </style:style>
    <style:style style:name="P47" style:family="paragraph" style:parent-style-name="Preformatted_20_Text">
      <style:paragraph-properties fo:margin-top="0cm" fo:margin-bottom="0.247cm" style:contextual-spacing="false" fo:line-height="115%"/>
      <style:text-properties style:use-window-font-color="true" loext:opacity="0%" style:font-name="Times New Roman" fo:font-size="14pt" fo:language="en" fo:country="US" fo:font-weight="normal" officeooo:rsid="001cb8ab" officeooo:paragraph-rsid="0021d38d" style:font-size-asian="14pt" style:font-weight-asian="normal" style:font-size-complex="14pt" style:font-weight-complex="normal"/>
    </style:style>
    <style:style style:name="P48" style:family="paragraph" style:parent-style-name="Preformatted_20_Text">
      <style:paragraph-properties fo:margin-top="0cm" fo:margin-bottom="0.247cm" style:contextual-spacing="false" fo:line-height="115%"/>
      <style:text-properties style:font-name="Times New Roman" fo:font-size="14pt" fo:language="en" fo:country="US" officeooo:rsid="001cb8ab" style:font-size-asian="14pt" style:font-size-complex="14pt"/>
    </style:style>
    <style:style style:name="P49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Times New Roman" fo:font-size="14pt" fo:language="en" fo:country="US" fo:font-style="normal" style:text-underline-style="none" fo:font-weight="normal" officeooo:rsid="001cb8ab" officeooo:paragraph-rsid="0023aa8d" style:text-blinking="false" fo:background-color="transparent" style:font-size-asian="14pt" style:font-weight-asian="normal" style:font-size-complex="14pt" style:font-weight-complex="normal"/>
    </style:style>
    <style:style style:name="P50" style:family="paragraph" style:parent-style-name="Text_20_body">
      <style:text-properties style:use-window-font-color="true" loext:opacity="0%" style:font-name="Times New Roman" fo:font-size="14pt" fo:language="uk" fo:country="UA" fo:font-weight="normal" officeooo:rsid="001c2d58" officeooo:paragraph-rsid="001c2d58" style:font-size-asian="14pt" style:font-weight-asian="normal" style:font-size-complex="14pt" style:font-weight-complex="normal"/>
    </style:style>
    <style:style style:name="P51" style:family="paragraph" style:parent-style-name="Text_20_body">
      <style:text-properties style:use-window-font-color="true" loext:opacity="0%" style:font-name="Times New Roman" fo:font-size="14pt" fo:language="uk" fo:country="UA" fo:font-weight="normal" officeooo:rsid="00292464" officeooo:paragraph-rsid="001c2d58" style:font-size-asian="14pt" style:font-weight-asian="normal" style:font-size-complex="14pt" style:font-weight-complex="normal"/>
    </style:style>
    <style:style style:name="P52" style:family="paragraph" style:parent-style-name="Preformatted_20_Text">
      <style:paragraph-properties fo:margin-top="0cm" fo:margin-bottom="0.247cm" style:contextual-spacing="false" fo:line-height="115%"/>
      <style:text-properties style:font-name="Times New Roman" fo:font-size="14pt" officeooo:rsid="001c2d58" officeooo:paragraph-rsid="00292464" style:font-size-asian="14pt" style:font-size-complex="14pt"/>
    </style:style>
    <style:style style:name="P53" style:family="paragraph" style:parent-style-name="Preformatted_20_Text">
      <style:paragraph-properties fo:margin-top="0cm" fo:margin-bottom="0.247cm" style:contextual-spacing="false" fo:line-height="115%"/>
      <style:text-properties style:font-name="Times New Roman" fo:font-size="14pt" fo:font-weight="normal" officeooo:rsid="001c2d58" officeooo:paragraph-rsid="00292464" style:font-size-asian="14pt" style:font-weight-asian="normal" style:font-size-complex="14pt" style:font-weight-complex="normal"/>
    </style:style>
    <style:style style:name="P54" style:family="paragraph" style:parent-style-name="Text_20_body">
      <style:text-properties style:use-window-font-color="true" loext:opacity="0%" style:font-name="Times New Roman" fo:font-size="14pt" fo:language="uk" fo:country="UA" fo:font-weight="normal" officeooo:rsid="002a60c8" officeooo:paragraph-rsid="002a60c8" style:font-size-asian="14pt" style:font-weight-asian="normal" style:font-size-complex="14pt" style:font-weight-complex="normal"/>
    </style:style>
    <style:style style:name="P55" style:family="paragraph" style:parent-style-name="Text_20_body">
      <style:text-properties style:use-window-font-color="true" loext:opacity="0%" style:font-name="Times New Roman" fo:font-size="14pt" fo:language="uk" fo:country="UA" fo:font-weight="normal" officeooo:rsid="001c2d58" officeooo:paragraph-rsid="002cb218" style:font-size-asian="14pt" style:font-weight-asian="normal" style:font-size-complex="14pt" style:font-weight-complex="normal"/>
    </style:style>
    <style:style style:name="P56" style:family="paragraph" style:parent-style-name="Text_20_body" style:list-style-name="L3">
      <style:text-properties style:font-name="Times New Roman" fo:font-size="14pt" officeooo:rsid="001c2d58" officeooo:paragraph-rsid="002b55e4" style:font-size-asian="14pt" style:font-size-complex="14pt"/>
    </style:style>
    <style:style style:name="P57" style:family="paragraph" style:parent-style-name="Text_20_body" style:list-style-name="L3">
      <style:text-properties style:font-name="Times New Roman" fo:font-size="14pt" officeooo:rsid="001c2d58" style:font-size-asian="14pt" style:font-size-complex="14pt"/>
    </style:style>
    <style:style style:name="P58" style:family="paragraph" style:parent-style-name="Text_20_body">
      <style:text-properties style:font-name="Times New Roman" fo:font-size="14pt" officeooo:rsid="001c2d58" style:font-size-asian="14pt" style:font-size-complex="14pt"/>
    </style:style>
    <style:style style:name="P59" style:family="paragraph" style:parent-style-name="Heading_20_3">
      <style:text-properties style:use-window-font-color="true" loext:opacity="0%" style:font-name="Times New Roman" fo:font-size="14pt" fo:language="uk" fo:country="UA" fo:font-weight="normal" officeooo:rsid="001c2d58" officeooo:paragraph-rsid="001c2d58" style:font-size-asian="14pt" style:font-weight-asian="normal" style:font-size-complex="14pt" style:font-weight-complex="normal"/>
    </style:style>
    <style:style style:name="P60" style:family="paragraph" style:parent-style-name="Heading_20_3">
      <style:text-properties style:use-window-font-color="true" loext:opacity="0%" style:font-name="Times New Roman" fo:font-size="14pt" fo:language="uk" fo:country="UA" fo:font-weight="normal" officeooo:rsid="001c2d58" officeooo:paragraph-rsid="002d8b9d" style:font-size-asian="14pt" style:font-weight-asian="normal" style:font-size-complex="14pt" style:font-weight-complex="normal"/>
    </style:style>
    <style:style style:name="P61" style:family="paragraph" style:parent-style-name="Heading_20_3">
      <style:text-properties style:font-name="Times New Roman" fo:font-size="14pt" officeooo:rsid="001c2d58" officeooo:paragraph-rsid="002d8b9d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31736b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officeooo:rsid="0001f96c"/>
    </style:style>
    <style:style style:name="T6" style:family="text">
      <style:text-properties officeooo:rsid="000df0a4"/>
    </style:style>
    <style:style style:name="T7" style:family="text">
      <style:text-properties fo:color="#1f1f1f" loext:opacity="100%" style:font-name="Times New Roman" fo:font-size="14pt" style:font-size-asian="14pt" style:font-size-complex="14pt" loext:padding="0cm" loext:border="none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officeooo:rsid="0014d575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n" fo:country="US" officeooo:rsid="00177dbb"/>
    </style:style>
    <style:style style:name="T12" style:family="text">
      <style:text-properties fo:font-variant="normal" fo:text-transform="none" style:text-line-through-style="none" style:text-line-through-type="none" fo:language="ru" fo:country="RU" fo:font-style="normal" style:text-underline-style="none" officeooo:rsid="001780b3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4" style:family="text">
      <style:text-properties style:use-window-font-color="true" loext:opacity="0%" style:font-name="Times New Roman" fo:font-weight="normal" style:font-weight-asian="normal" style:font-weight-complex="normal"/>
    </style:style>
    <style:style style:name="T15" style:family="text">
      <style:text-properties style:use-window-font-color="true" loext:opacity="0%" style:font-name="Times New Roman" fo:language="ru" fo:country="RU" fo:font-weight="normal" officeooo:rsid="0018a449" style:font-weight-asian="normal" style:font-weight-complex="normal"/>
    </style:style>
    <style:style style:name="T16" style:family="text">
      <style:text-properties style:use-window-font-color="true" loext:opacity="0%" fo:font-weight="normal" style:font-weight-asian="normal" style:font-weight-complex="normal"/>
    </style:style>
    <style:style style:name="T17" style:family="text">
      <style:text-properties fo:language="en" fo:country="US" officeooo:rsid="001cb8ab"/>
    </style:style>
    <style:style style:name="T18" style:family="text">
      <style:text-properties fo:language="ru" fo:country="RU" officeooo:rsid="0023aa8d"/>
    </style:style>
    <style:style style:name="T19" style:family="text">
      <style:text-properties style:font-name="Times New Roman"/>
    </style:style>
    <style:style style:name="T20" style:family="text">
      <style:text-properties officeooo:rsid="0027a2c6"/>
    </style:style>
    <style:style style:name="T21" style:family="text">
      <style:text-properties style:font-name="Times New Roman" fo:font-weight="normal" style:font-weight-asian="normal" style:font-weight-complex="normal"/>
    </style:style>
    <style:style style:name="T22" style:family="text">
      <style:text-properties style:use-window-font-color="true" loext:opacity="0%" fo:language="uk" fo:country="UA" fo:font-weight="normal" style:font-weight-asian="normal" style:font-weight-complex="normal"/>
    </style:style>
    <style:style style:name="T23" style:family="text">
      <style:text-properties style:use-window-font-color="true" loext:opacity="0%" fo:language="en" fo:country="US" fo:font-weight="normal" officeooo:rsid="002d8b9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2</text:p>
      <text:p text:style-name="P2">Жи<text:span text:style-name="T1">ла Іван Дмитрович ІМ-42</text:span><text:span text:style-name="T2"/></text:p>
      <text:p text:style-name="P3"><text:span text:style-name="T3">К</text:span>онтейнеризація</text:p>
      <text:p text:style-name="P4"><text:span text:style-name="T3">Д</text:span><text:span text:style-name="T4">ослідницька частина</text:span></text:p>
      <text:p text:style-name="P5">Python Application</text:p>
      <text:p text:style-name="P5"/>
      <text:p text:style-name="P6"># 1. Створення неоптимізованого образу застосунку</text:p>
      <text:p text:style-name="P6">Створюємо неідеальний Dockerfile для застосунку на базі Debian Bookworm, де копіювання всього коду та встановлення залежностей виконуються в одному шарі:</text:p>
      <text:p text:style-name="P6"/>
      <text:p text:style-name="P7">FROM python:3.12-bookworm</text:p>
      <text:p text:style-name="P7">WORKDIR /app</text:p>
      <text:p text:style-name="P7">COPY . .</text:p>
      <text:p text:style-name="P7">RUN pip install -r requirements.txt</text:p>
      <text:p text:style-name="P7">CMD ["python", "spaceship/app.py"]</text:p>
      <text:p text:style-name="P6"/>
      <text:p text:style-name="P6">Перед оцінюванням ефективності завантажуємо чистий базовий образ, щоб вимірювання часу було об'єктивним:</text:p>
      <text:p text:style-name="P6">docker pull python:3.12-bookworm</text:p>
      <text:p text:style-name="P6"/>
      <text:p text:style-name="P6">Запуск первинного збирання без використання кешу:</text:p>
      <text:p text:style-name="P6">time docker build --no-cache -t python-lab:test-bookworm .</text:p>
      <text:p text:style-name="P6"/>
      <text:p text:style-name="P6">Результати першої збірки:</text:p>
      <text:p text:style-name="P6"><draw:frame draw:style-name="fr1" draw:name="Зображення1" text:anchor-type="char" svg:x="0.127cm" svg:y="0cm" svg:width="4.805cm" svg:height="1.609cm" draw:z-index="0"><draw:image xlink:href="Pictures/10000001000000E30000004C7ADB58ED.png" xlink:type="simple" xlink:show="embed" xlink:actuate="onLoad" draw:mime-type="image/png"/></draw:frame></text:p>
      <text:p text:style-name="P6"/>
      <text:p text:style-name="P6"/>
      <text:p text:style-name="P6"><draw:frame draw:style-name="fr1" draw:name="Зображення2" text:anchor-type="char" svg:x="0.042cm" svg:y="0.123cm" svg:width="14.734cm" svg:height="1.376cm" draw:z-index="1"><draw:image xlink:href="Pictures/10000001000002B8000000411DCCFD15.png" xlink:type="simple" xlink:show="embed" xlink:actuate="onLoad" draw:mime-type="image/png"/></draw:frame></text:p>
      <text:p text:style-name="P6"/>
      <text:p text:style-name="P6"><text:soft-page-break/># 2. Повторна збірка після внесення змін у код</text:p>
      <text:p text:style-name="P6">Вносимо зміни у файл spaceship/app.py, змушуючи програму виводити ім'я та групу студента:</text:p>
      <text:p text:style-name="P6"/>
      <text:p text:style-name="P7">print("Ivan Zhila IM-42")</text:p>
      <text:p text:style-name="P6"/>
      <text:p text:style-name="P6">Запускаємо повторну збірку образу з новою версією коду:</text:p>
      <text:p text:style-name="P6">time docker build -t python-lab:test-bookworm2 .</text:p>
      <text:p text:style-name="P6"/>
      <text:p text:style-name="P6">Результати повторної збірки неоптимізованого образу:</text:p>
      <text:p text:style-name="P6"/>
      <text:p text:style-name="P6"><draw:frame draw:style-name="fr1" draw:name="Зображення3" text:anchor-type="char" svg:x="0.245cm" svg:y="-0.199cm" svg:width="4.614cm" svg:height="1.588cm" draw:z-index="2"><draw:image xlink:href="Pictures/10000001000000DA0000004BE80EB28E.png" xlink:type="simple" xlink:show="embed" xlink:actuate="onLoad" draw:mime-type="image/png"/></draw:frame></text:p>
      <text:p text:style-name="P6"/>
      <text:p text:style-name="P6"/>
      <text:p text:style-name="P6">Висновок: Оскільки інструкція COPY . . копіює всі файли проєкту разом, будь-яка мінорна зміна у вихідному коді призводить до повної інвалідації кешу для цього шару. Як результат, наступний крок RUN pip install повністю скидає кеш і запускається заново. Це неефективно, оскільки важкий процес інсталяції пакетів виконується при кожному білді.</text:p>
      <text:p text:style-name="P6"/>
      <text:p text:style-name="P6"># 3. Оптимізація структури Dockerfile (Використання шарів)</text:p>
      <text:p text:style-name="P6">Для ефективного використання кешування Dockerfile було переписано. Тепер інструкції розташовані від тих, що змінюються найрідше (список залежностей), до тих, що змінюються найчастіше (код програми):</text:p>
      <text:p text:style-name="P6"/>
      <text:p text:style-name="P7">FROM python:3.12-bookworm</text:p>
      <text:p text:style-name="P7">WORKDIR /app</text:p>
      <text:p text:style-name="P7">COPY requirements.txt .</text:p>
      <text:p text:style-name="P7">RUN pip install -r requirements.txt</text:p>
      <text:p text:style-name="P7">COPY . .</text:p>
      <text:p text:style-name="P7"><text:soft-page-break/>CMD ["python", "spaceship/app.py"]</text:p>
      <text:p text:style-name="P6"/>
      <text:p text:style-name="P6">Запуск первинного збирання оптимізованого образу (без кешу):</text:p>
      <text:p text:style-name="P6">time docker build --no-cache -t python-lab:optimized .</text:p>
      <text:p text:style-name="P6"/>
      <text:p text:style-name="P6">Результати першої збірки оптимізованого образу:</text:p>
      <text:p text:style-name="P6"><draw:frame draw:style-name="fr1" draw:name="Зображення4" text:anchor-type="char" svg:x="0.037cm" svg:y="-0.134cm" svg:width="4.805cm" svg:height="1.778cm" draw:z-index="3"><draw:image xlink:href="Pictures/10000001000000E3000000545F1F6616.png" xlink:type="simple" xlink:show="embed" xlink:actuate="onLoad" draw:mime-type="image/png"/></draw:frame></text:p>
      <text:p text:style-name="P6"/>
      <text:p text:style-name="P6"/>
      <text:p text:style-name="P6">Після цього у файл коду spaceship/app.py було внесено додаткову зміну в рядок принта та запущено повторне збирання:</text:p>
      <text:p text:style-name="P6">time docker build -t python-lab:optimized2 .</text:p>
      <text:p text:style-name="P6"/>
      <text:p text:style-name="P6">Результати повторної збірки після оптимізації шарів:</text:p>
      <text:p text:style-name="P6"><draw:frame draw:style-name="fr1" draw:name="Зображення5" text:anchor-type="char" svg:x="0.095cm" svg:y="0cm" svg:width="4.424cm" svg:height="1.799cm" draw:z-index="4"><draw:image xlink:href="Pictures/10000001000000D100000055E1FDCE24.png" xlink:type="simple" xlink:show="embed" xlink:actuate="onLoad" draw:mime-type="image/png"/></draw:frame></text:p>
      <text:p text:style-name="P6"/>
      <text:p text:style-name="P6"/>
      <text:p text:style-name="P6">Аналіз механізму кешування:</text:p>
      <text:p text:style-name="P8"><text:span text:style-name="T5">Після оптимізації крок COPY requirements.txt . копіює лише файл із бібліотеками. Оскільки цей файл не змінювався, інструкція RUN pip install успішно береться з локального кешу Docker (`---&gt; Using cache`). </text:span>Реальна робота системи з генерації нових шарів починається лише на етапі `COPY . .`, де копіюється змінений код програми. Завдяки цьому час повторного збирання після модифікації коду скоротився з 19.119 секунд до 5.697 секунд (чиста економія склала понад 13 секунд на кожному білді, а порівняно з повним чистим розгортанням час зменшився майже в 5 разів — з 28.085 секунд). Такий результат наочно демонструє ефективність правильного розділення шарів у Dockerfile, оскільки тривалий процес мережевого завантаження та інсталяції пакетів повністю пропускається.</text:p>
      <text:p text:style-name="P8"/>
      <text:p text:style-name="P8"># 4. Дослідження мінімального базового образу (Alpine Linux)</text:p>
      <text:p text:style-name="P8"><text:soft-page-break/>Для максимального зменшення розміру фінального образу було прийнято рішення замінити базовий образ Debian Bookworm на ультралегкий дистрибутив Alpine Linux. </text:p>
      <text:p text:style-name="P8"/>
      <text:p text:style-name="P8">Файл Dockerfile було модифіковано, замінивши перший рядок на:</text:p>
      <text:p text:style-name="P8">FROM python:3.12-alpine</text:p>
      <text:p text:style-name="P8"/>
      <text:p text:style-name="P8">Перед тестуванням було виконано примусове завантаження чистого образу для забезпечення точності вимірювань:</text:p>
      <text:p text:style-name="P8">docker pull python:3.12-alpine</text:p>
      <text:p text:style-name="P8"/>
      <text:p text:style-name="P8">Запуск первинного збирання на базі Alpine (без кешу):</text:p>
      <text:p text:style-name="P8">time docker build --no-cache -t python-lab:alpine-clean .</text:p>
      <text:p text:style-name="P8"/>
      <text:p text:style-name="P8">Результати збірки на Alpine:</text:p>
      <text:p text:style-name="P8"><draw:frame draw:style-name="fr1" draw:name="Зображення6" text:anchor-type="char" svg:x="0.425cm" svg:y="-0.111cm" svg:width="4.699cm" svg:height="1.461cm" draw:z-index="5"><draw:image xlink:href="Pictures/10000001000000DE00000045294FDD63.png" xlink:type="simple" xlink:show="embed" xlink:actuate="onLoad" draw:mime-type="image/png"/></draw:frame></text:p>
      <text:p text:style-name="P8"/>
      <text:p text:style-name="P8"><draw:frame draw:style-name="fr1" draw:name="Зображення7" text:anchor-type="char" svg:x="-0.138cm" svg:y="0.111cm" svg:width="15.536cm" svg:height="1.672cm" draw:z-index="6"><draw:image xlink:href="Pictures/10000001000002DE0000004F2CB4B4CE.png" xlink:type="simple" xlink:show="embed" xlink:actuate="onLoad" draw:mime-type="image/png"/></draw:frame></text:p>
      <text:p text:style-name="P8">Висновок: Перехід на базовий образ Alpine Linux дозволив кардинально зменшити розмір готового контейнера (з 1.52 GB до всього <text:span text:style-name="T6">123</text:span> мегабайт). Це досягається завдяки відсутності в Alpine зайвих системних утиліт та використанню оптимізованої бібліотеки musl libc замість стандартної glibc.</text:p>
      <text:p text:style-name="P8"/>
      <text:p text:style-name="P8"># 5. Тестування важких залежностей (Впровадження NumPy)</text:p>
      <text:p text:style-name="P8">Для дослідження поведінки образів при додаванні складних бібліотек, що містять C-розширення, у проєкт було додано пакет `numpy`. У файл `spaceship/routers/api.py` впроваджено новий ендпоінт `/matrix`, який генерує дві випадкові матриці 10x10 та обчислює їхній добуток за допомогою NumPy:</text:p>
      <text:p text:style-name="P8"/>
      <text:p text:style-name="P9"><text:soft-page-break/>from fastapi import APIRouter</text:p>
      <text:p text:style-name="P9">import numpy as np</text:p>
      <text:p text:style-name="P9"/>
      <text:p text:style-name="P9">router = APIRouter()</text:p>
      <text:p text:style-name="P9"/>
      <text:p text:style-name="P9">@router.get('')</text:p>
      <text:p text:style-name="P9">def hello_world() -&gt; dict:</text:p>
      <text:p text:style-name="P9"><text:s text:c="4"/>return {'msg': 'Hello, World!'}</text:p>
      <text:p text:style-name="P9"/>
      <text:p text:style-name="P9">@router.get("/matrix")</text:p>
      <text:p text:style-name="P9">def get_matrix():</text:p>
      <text:p text:style-name="P9"><text:s text:c="4"/>matrix_a = np.random.rand(10, 10)</text:p>
      <text:p text:style-name="P9"><text:s text:c="4"/>matrix_b = np.random.rand(10, 10)</text:p>
      <text:p text:style-name="P9"/>
      <text:p text:style-name="P9"><text:s text:c="4"/>product = np.matmul(matrix_a, matrix_b)</text:p>
      <text:p text:style-name="P9"/>
      <text:p text:style-name="P9"><text:s text:c="4"/>return {</text:p>
      <text:p text:style-name="P9"><text:s text:c="8"/>"matrix_a": matrix_a.tolist(),</text:p>
      <text:p text:style-name="P9"><text:s text:c="8"/>"matrix_b": matrix_b.tolist(),</text:p>
      <text:p text:style-name="P9"><text:s text:c="8"/>"product": product.tolist()</text:p>
      <text:p text:style-name="P10"><text:s text:c="4"/>}</text:p>
      <text:p text:style-name="P11"/>
      <text:p text:style-name="P11"/>
      <text:p text:style-name="P11"/>
      <text:p text:style-name="P11"/>
      <text:p text:style-name="P11">Було проведено порівняльний аналіз часу першої збірки (з чистим кешем) та фінального розміру для обох базових образів:</text:p>
      <text:p text:style-name="P11"/>
      <text:p text:style-name="P11"/>
      <text:p text:style-name="P12"><text:soft-page-break/>python:3.12-bookworm:</text:p>
      <text:p text:style-name="P13">Запускаємо чисту збірку з NumPy на Debian: </text:p>
      <text:p text:style-name="P14"/>
      <text:p text:style-name="P11">time docker build --no-cache -t python-lab:bookworm-numpy .</text:p>
      <text:p text:style-name="P11"><draw:frame draw:style-name="fr1" draw:name="Зображення8" text:anchor-type="char" svg:x="0.527cm" svg:y="-0.102cm" svg:width="4.805cm" svg:height="1.672cm" draw:z-index="7"><draw:image xlink:href="Pictures/10000001000000E30000004F481E0B69.png" xlink:type="simple" xlink:show="embed" xlink:actuate="onLoad" draw:mime-type="image/png"/></draw:frame></text:p>
      <text:p text:style-name="P11"/>
      <text:p text:style-name="P11"/>
      <text:p text:style-name="P15">Підсумкова вага:</text:p>
      <text:p text:style-name="P15">docker images python-lab:bookworm-numpy</text:p>
      <text:p text:style-name="P15"/>
      <text:p text:style-name="P15"><draw:frame draw:style-name="fr2" draw:name="Зображення9" text:anchor-type="char" svg:width="17cm" svg:height="0.977cm" draw:z-index="8"><draw:image xlink:href="Pictures/10000001000003CD000000383ED35D7A.png" xlink:type="simple" xlink:show="embed" xlink:actuate="onLoad" draw:mime-type="image/png"/></draw:frame></text:p>
      <text:p text:style-name="P15"/>
      <text:p text:style-name="P12">python:3.12-alpine:</text:p>
      <text:p text:style-name="P13">Запускаємо чисту збірку з NumPy на Alpine: </text:p>
      <text:p text:style-name="P13"/>
      <text:p text:style-name="P13">time docker build --no-cache -t python-lab:alpine-numpy .</text:p>
      <text:p text:style-name="P13"/>
      <text:p text:style-name="P13"><draw:frame draw:style-name="fr1" draw:name="Зображення10" text:anchor-type="char" svg:x="0.109cm" svg:y="0.134cm" svg:width="4.974cm" svg:height="1.482cm" draw:z-index="9"><draw:image xlink:href="Pictures/10000001000000EB000000469C778154.png" xlink:type="simple" xlink:show="embed" xlink:actuate="onLoad" draw:mime-type="image/png"/></draw:frame></text:p>
      <text:p text:style-name="P16"/>
      <text:p text:style-name="P16"/>
      <text:p text:style-name="P16"/>
      <text:p text:style-name="P17">Підсумкова вага:</text:p>
      <text:p text:style-name="P17"/>
      <text:p text:style-name="P17">docker images python-lab:alpine-numpy</text:p>
      <text:p text:style-name="P16"><draw:frame draw:style-name="fr1" draw:name="Зображення11" text:anchor-type="char" svg:x="-0.312cm" svg:y="1.427cm" svg:width="17cm" svg:height="1.025cm" draw:z-index="10"><draw:image xlink:href="Pictures/10000001000003B10000003926A7C70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header-rows>
          <text:soft-page-break/>
          <table:table-row>
            <table:table-cell table:style-name="Таблиця1.A1" office:value-type="string">
              <text:p text:style-name="P18"><text:span text:style-name="Strong_20_Emphasis"><text:span text:style-name="T7">Базовий образ</text:span></text:span></text:p>
            </table:table-cell>
            <table:table-cell table:style-name="Таблиця1.B1" office:value-type="string">
              <text:p text:style-name="P18"><text:span text:style-name="Strong_20_Emphasis"><text:span text:style-name="T7">Час першої збірки (real)</text:span></text:span></text:p>
            </table:table-cell>
            <table:table-cell table:style-name="Таблиця1.C1" office:value-type="string">
              <text:p text:style-name="P18"><text:span text:style-name="Strong_20_Emphasis"><text:span text:style-name="T7">Підсумковий розмір образу</text:span></text:span></text:p>
            </table:table-cell>
          </table:table-row>
        </table:table-header-rows>
        <table:table-row>
          <table:table-cell table:style-name="Таблиця1.A2" office:value-type="string">
            <text:p text:style-name="P19">python:3.12-bookworm</text:p>
          </table:table-cell>
          <table:table-cell table:style-name="Таблиця1.B2" office:value-type="string">
            <text:p text:style-name="P20">54.03<text:span text:style-name="T8">3 s</text:span></text:p>
          </table:table-cell>
          <table:table-cell table:style-name="Таблиця1.C2" office:value-type="string">
            <text:p text:style-name="P21">1.64GB</text:p>
          </table:table-cell>
        </table:table-row>
        <table:table-row>
          <table:table-cell table:style-name="Таблиця1.A2" office:value-type="string">
            <text:p text:style-name="P19">python:3.12-alpine</text:p>
          </table:table-cell>
          <table:table-cell table:style-name="Таблиця1.B2" office:value-type="string">
            <text:p text:style-name="P22">29.847 s</text:p>
          </table:table-cell>
          <table:table-cell table:style-name="Таблиця1.C2" office:value-type="string">
            <text:p text:style-name="P23">260 <text:span text:style-name="T8">MB</text:span></text:p>
          </table:table-cell>
        </table:table-row>
      </table:table>
      <text:p text:style-name="P11"/>
      <text:p text:style-name="P24">Порівняльний аналіз результатів:</text:p>
      <text:p text:style-name="P24">- Розмір образу: Оптимізований образ на базі Alpine разом із встановленим NumPy важить у 6.4 раза менше за версію на Debian Bookworm (260 MB проти 1.64 GB), що демонструє колосальну економію дискового простору.</text:p>
      <text:p text:style-name="P25"><text:span text:style-name="T9">- </text:span><text:span text:style-name="T10">Час збірки: Під час аналізу логів було виявлено, що менеджер пакетів </text:span><text:span text:style-name="Source_20_Text"><text:span text:style-name="T10">pip</text:span></text:span><text:span text:style-name="T10"> зміг підібрати pre-compiled wheel-пакет спеціально для архітектури Alpine (</text:span><text:span text:style-name="Source_20_Text"><text:span text:style-name="T10">musllinux_1_2_x86_64.whl</text:span></text:span><text:span text:style-name="T10">). Завдяки наявності готового бінарника під системну бібліотеку </text:span><text:span text:style-name="Source_20_Text"><text:span text:style-name="T10">musl</text:span></text:span><text:span text:style-name="T10">, образу Alpine не знадобилося виконувати тривалу компіляцію вихідного коду бібліотеки NumPy з нуля. Як результат, час збірки на Alpine склав всього 29.847 с, що виявилося навіть швидше за завантаження та розпакування аналогічного пакета на Debian Bookworm (54.033 с).</text:span></text:p>
      <text:p text:style-name="P26"/>
      <text:p text:style-name="P26"/>
      <text:h text:style-name="P27" text:outline-level="3"><text:span text:style-name="T11">M</text:span>usl (Alpine) vs glibc (Debian/Ubuntu/etc)</text:h>
      <text:p text:style-name="P28"><text:span text:style-name="T12">Д</text:span><text:span text:style-name="T13">ля дослідження відмінностей у роботі системних бібліотек було створено окрему мережу в Docker: </text:span></text:p>
      <text:p text:style-name="P29"><text:span text:style-name="Source_20_Text"><text:span text:style-name="T14">docker network create dns-lab</text:span></text:span></text:p>
      <text:p text:style-name="P29"><text:span text:style-name="Source_20_Text"><text:span text:style-name="T14"/></text:span></text:p>
      <text:p text:style-name="P30"><text:span text:style-name="T15">У</text:span><text:span text:style-name="T14"> першому вікні терміналу було запущено локальний DNS-сервер на базі утиліти </text:span><text:span text:style-name="Source_20_Text"><text:span text:style-name="T14">dnsmasq</text:span></text:span><text:span text:style-name="T14">, налаштований резолвити кастомний корпоративний домен </text:span><text:span text:style-name="Source_20_Text"><text:span text:style-name="T14">myservice.internal.corp</text:span></text:span><text:span text:style-name="T14"> на IP-адресу </text:span><text:span text:style-name="Source_20_Text"><text:span text:style-name="T14">10.0.0.50</text:span></text:span></text:p>
      <text:p text:style-name="P30"><text:span text:style-name="Source_20_Text"><text:span text:style-name="T14"/></text:span></text:p>
      <text:p text:style-name="P30"><text:span text:style-name="Source_20_Text"><text:span text:style-name="T15">У</text:span></text:span><text:span text:style-name="T14"> другому вікні терміналу було виконано послідовне тестування резолвінгу короткого імені </text:span><text:span text:style-name="Source_20_Text"><text:span text:style-name="T14">myservice.internal</text:span></text:span><text:span text:style-name="T14"> з використанням пошукового суфікса через параметр </text:span><text:span text:style-name="Source_20_Text"><text:span text:style-name="T14">--dns-search="corp"</text:span></text:span><text:span text:style-name="T14"> для двох різних дистрибутивів . </text:span></text:p>
      <text:h text:style-name="P31" text:outline-level="4"><text:soft-page-break/>1. Результати тестування у контейнері Ubuntu (glibc)</text:h>
      <text:p text:style-name="P29"><text:span text:style-name="Source_20_Text"><text:span text:style-name="T14">ivanadmin@kpi-lab:~$ docker run --rm --network dns-lab \</text:span></text:span></text:p>
      <text:p text:style-name="P29"><text:span text:style-name="Source_20_Text"><text:span text:style-name="T14">--dns=$(docker inspect -f '{{range .NetworkSettings.Networks}}{{.IPAddress}}{{end}}' dns-server) \</text:span></text:span></text:p>
      <text:p text:style-name="P29"><text:span text:style-name="Source_20_Text"><text:span text:style-name="T14">--dns-search="corp" \</text:span></text:span></text:p>
      <text:p text:style-name="P32"><text:span text:style-name="Source_20_Text"><text:span text:style-name="T14">ubuntu:latest getent hosts myservice.internal</text:span></text:span></text:p>
      <text:p text:style-name="P33"/>
      <text:p text:style-name="P32"><text:span text:style-name="Source_20_Text"><text:span text:style-name="T14">10.0.0.50 <text:s text:c="6"/>myservice.internal.corp</text:span></text:span></text:p>
      <text:p text:style-name="P34"/>
      <text:p text:style-name="P35"><text:span text:style-name="T14">Результат: Контейнер на базі Ubuntu успішно розрезолвив домен і повернув IP </text:span><text:span text:style-name="Source_20_Text"><text:span text:style-name="T14">10.0.0.50</text:span></text:span><text:span text:style-name="T14">.</text:span></text:p>
      <text:h text:style-name="P31" text:outline-level="4">2. Результати тестування у контейнері Alpine (musl libc)</text:h>
      <text:p text:style-name="P34">Bash</text:p>
      <text:p text:style-name="P29"><text:span text:style-name="Source_20_Text"><text:span text:style-name="T14">ivanadmin@kpi-lab:~$ docker run --rm --network dns-lab \</text:span></text:span></text:p>
      <text:p text:style-name="P29"><text:span text:style-name="Source_20_Text"><text:span text:style-name="T14">--dns=$(docker inspect -f '{{range .NetworkSettings.Networks}}{{.IPAddress}}{{end}}' dns-server) \</text:span></text:span></text:p>
      <text:p text:style-name="P29"><text:span text:style-name="Source_20_Text"><text:span text:style-name="T14">--dns-search="corp" \</text:span></text:span></text:p>
      <text:p text:style-name="P32"><text:span text:style-name="Source_20_Text"><text:span text:style-name="T14">alpine:latest getent hosts myservice.internal</text:span></text:span></text:p>
      <text:p text:style-name="P33"/>
      <text:p text:style-name="P32"><text:span text:style-name="Source_20_Text"><text:span text:style-name="T14">ivanadmin@kpi-lab:~$</text:span></text:span></text:p>
      <text:p text:style-name="P34">Результат: Контейнер на базі Alpine повернув порожню відповідь, тобто не зміг знайти хост.</text:p>
      <text:h text:style-name="P31" text:outline-level="4"/>
      <text:h text:style-name="P31" text:outline-level="4">3. Аналіз логів DNS-сервера </text:h>
      <text:p text:style-name="P29"><text:span text:style-name="Source_20_Text"><text:span text:style-name="T14">dnsmasq[1]: query[AAAA] myservice.internal from 172.18.0.3</text:span></text:span></text:p>
      <text:p text:style-name="P32"><text:span text:style-name="Source_20_Text"><text:span text:style-name="T14">dnsmasq[1]: forwarded myservice.internal to 127.0.0.11</text:span></text:span></text:p>
      <text:p text:style-name="P32"><text:span text:style-name="Source_20_Text"><text:span text:style-name="T14">dnsmasq[1]: reply myservice.internal is NXDOMAIN</text:span></text:span></text:p>
      <text:p text:style-name="P32"><text:span text:style-name="Source_20_Text"><text:span text:style-name="T14">dnsmasq[1]: query[AAAA] myservice.internal.corp from 172.18.0.3</text:span></text:span></text:p>
      <text:p text:style-name="P32"><text:span text:style-name="Source_20_Text"><text:span text:style-name="T14">dnsmasq[1]: forwarded myservice.internal.corp to 127.0.0.11</text:span></text:span></text:p>
      <text:p text:style-name="P32"><text:span text:style-name="Source_20_Text"><text:span text:style-name="T14">dnsmasq[1]: reply myservice.internal.corp is NODATA-IPv6</text:span></text:span></text:p>
      <text:p text:style-name="P32"><text:span text:style-name="Source_20_Text"><text:span text:style-name="T14">dnsmasq[1]: query[A] myservice.internal from 172.18.0.3</text:span></text:span></text:p>
      <text:p text:style-name="P32"><text:span text:style-name="Source_20_Text"><text:span text:style-name="T14">dnsmasq[1]: cached myservice.internal is NXDOMAIN</text:span></text:span></text:p>
      <text:p text:style-name="P32"><text:span text:style-name="Source_20_Text"><text:span text:style-name="T14">dnsmasq[1]: query[A] myservice.internal.corp from 172.18.0.3</text:span></text:span></text:p>
      <text:p text:style-name="P32"><text:span text:style-name="Source_20_Text"><text:span text:style-name="T14">dnsmasq[1]: config myservice.internal.corp is 10.0.0.50</text:span></text:span></text:p>
      <text:p text:style-name="P32"><text:span text:style-name="Source_20_Text"><text:span text:style-name="T14">dnsmasq[1]: query[AAAA] myservice.internal from 172.18.0.3</text:span></text:span></text:p>
      <text:p text:style-name="P32"><text:span text:style-name="Source_20_Text"><text:span text:style-name="T14">dnsmasq[1]: cached myservice.internal is NXDOMAIN</text:span></text:span></text:p>
      <text:p text:style-name="P32"><text:soft-page-break/><text:span text:style-name="Source_20_Text"><text:span text:style-name="T14">dnsmasq[1]: query[A] myservice.internal from 172.18.0.3</text:span></text:span></text:p>
      <text:p text:style-name="P32"><text:span text:style-name="Source_20_Text"><text:span text:style-name="T14">dnsmasq[1]: cached myservice.internal is NXDOMAIN</text:span></text:span></text:p>
      <text:p text:style-name="P36"/>
      <text:p text:style-name="P28"/>
      <text:h text:style-name="P37" text:outline-level="3">Порівняння результатів (Ubuntu проти Alpine)</text:h>
      <text:p text:style-name="P28">Тест чітко показав, що контейнери на різних системах шукають домени по-різному:</text:p>
      <text:list text:style-name="L1">
        <text:list-item>
          <text:p text:style-name="P38"><text:span text:style-name="T16">Ubuntu (glibc): Спершу робить запит на коротке ім'я </text:span><text:span text:style-name="Source_20_Text"><text:span text:style-name="T14">myservice.internal</text:span></text:span><text:span text:style-name="T16">. Сервер відповідає, що такого немає. Тоді Ubuntu дивиться в налаштування </text:span><text:span text:style-name="Source_20_Text"><text:span text:style-name="T14">dns-search</text:span></text:span><text:span text:style-name="T16">, сама дописує в кінець суфікс </text:span><text:span text:style-name="Source_20_Text"><text:span text:style-name="T14">.corp</text:span></text:span><text:span text:style-name="T16"> і з другої спроби успішно знаходить повну адресу </text:span><text:span text:style-name="Source_20_Text"><text:span text:style-name="T14">myservice.internal.corp</text:span></text:span><text:span text:style-name="T16"> (IP </text:span><text:span text:style-name="Source_20_Text"><text:span text:style-name="T14">10.0.0.50</text:span></text:span><text:span text:style-name="T16">).</text:span></text:p>
        </text:list-item>
        <text:list-item>
          <text:p text:style-name="P38"><text:span text:style-name="T16">Alpine (musl libc): Робить один запит, отримує відповідь, що хоста немає, і на цьому просто зупиняється. Прапорець </text:span><text:span text:style-name="Source_20_Text"><text:span text:style-name="T14">dns-search="corp"</text:span></text:span><text:span text:style-name="T16"> система взагалі проігнорувала.</text:span></text:p>
        </text:list-item>
      </text:list>
      <text:h text:style-name="P39" text:outline-level="4">Чому так вийшло (Різниця між Musl та Glibc)</text:h>
      <text:p text:style-name="P28">Вся справа в системних бібліотеках, які відповідають за роботу мережі:</text:p>
      <text:list text:style-name="L2">
        <text:list-item>
          <text:p text:style-name="P40">В Ubuntu стоїть бібліотека glibc. Вона велика і складна. Якщо вона не знаходить хост з першого разу, то починає перебирати всі хвости (суфікси) з файлу конфігурації, поки не знайде правильний.</text:p>
        </text:list-item>
        <text:list-item>
          <text:p text:style-name="P41"><text:span text:style-name="T16">В Alpine стоїть бібліотека musl libc. Її максимально урізали, щоб зробити образ легким і швидким. У неї проста логіка: якщо в імені, яке ми шукаємо, є хоча б одна крапка (як у нас </text:span><text:span text:style-name="Source_20_Text"><text:span text:style-name="T14">myservice.internal</text:span></text:span><text:span text:style-name="T16">), вона автоматично вважає це ім'я вже повною адресою. Тому вона робить лише один запит і нічого в кінець не домальовує.</text:span></text:p>
        </text:list-item>
      </text:list>
      <text:h text:style-name="P39" text:outline-level="4">Чому це критично на практиці:</text:h>
      <text:p text:style-name="P42"><text:span text:style-name="T16">У реальних проєктах на серверах сервіси часто зв'язуються між собою за короткими іменами (наприклад, у конфігах пишуть просто </text:span><text:span text:style-name="Source_20_Text"><text:span text:style-name="T14">database.internal</text:span></text:span><text:span text:style-name="T16">).</text:span></text:p>
      <text:p text:style-name="P28">Якщо розробник пише і тестує код на звичайній Ubuntu або macOS, усе працюватиме без проблем, бо система сама допише потрібний хвіст. Але якщо цей же проєкт запакувати в Docker-образ на Alpine і випустити на сервер, програма просто "осліпне" і не зможе підключитися до тієї ж бази даних. Причому конфіги будуть абсолютно однаковими, і таку помилку потім дуже важко шукати.</text:p>
      <text:h text:style-name="P39" text:outline-level="4"><text:soft-page-break/>Висновок:</text:h>
      <text:p text:style-name="P42"><text:span text:style-name="T16">Коли збираємо контейнери на базі Alpine Linux, у конфігах підключень (до баз даних, брокерів чи інших API) треба завжди писати повні адреси (FQDN) — наприклад, </text:span><text:span text:style-name="Source_20_Text"><text:span text:style-name="T14">myservice.internal.corp</text:span></text:span><text:span text:style-name="T16"> замість короткого </text:span><text:span text:style-name="Source_20_Text"><text:span text:style-name="T14">myservice.internal</text:span></text:span><text:span text:style-name="T16">. Тоді DNS працюватиме стабільно і передбачувано на будь-якому образі.</text:span></text:p>
      <text:p text:style-name="P28"/>
      <text:h text:style-name="P43" text:outline-level="3"><text:span text:style-name="T17">G</text:span>olang Application та Multi-stage builds</text:h>
      <text:p text:style-name="P44"># 1. Звичайна (одноетапна) збірка проєкту</text:p>
      <text:p text:style-name="P44">Створюємо стандартний Dockerfile, де в одному контейнері копіюється код, завантажуються залежності та компілюється бінарний файл:</text:p>
      <text:p text:style-name="P44"/>
      <text:p text:style-name="P44">FROM golang:1.22-bookworm</text:p>
      <text:p text:style-name="P44">WORKDIR /app</text:p>
      <text:p text:style-name="P44">COPY . .</text:p>
      <text:p text:style-name="P44">RUN go build -o main .</text:p>
      <text:p text:style-name="P44">CMD ["./main"]</text:p>
      <text:p text:style-name="P44"/>
      <text:p text:style-name="P44">Запуск первинного збирання без кешу:</text:p>
      <text:p text:style-name="P44">time docker build --no-cache -t go-lab:single .</text:p>
      <text:p text:style-name="P44"/>
      <text:p text:style-name="P44">Результати звичайної збірки:</text:p>
      <text:p text:style-name="P44"><draw:frame draw:style-name="fr1" draw:name="Зображення12" text:anchor-type="char" svg:x="0.279cm" svg:y="-0.134cm" svg:width="5.482cm" svg:height="1.736cm" draw:z-index="11"><draw:image xlink:href="Pictures/10000001000001030000005293732469.png" xlink:type="simple" xlink:show="embed" xlink:actuate="onLoad" draw:mime-type="image/png"/></draw:frame></text:p>
      <text:p text:style-name="P44"/>
      <text:p text:style-name="P44"><draw:frame draw:style-name="fr2" draw:name="Зображення13" text:anchor-type="char" svg:width="17cm" svg:height="1.263cm" draw:z-index="12"><draw:image xlink:href="Pictures/10000001000003350000003DA99C763A.png" xlink:type="simple" xlink:show="embed" xlink:actuate="onLoad" draw:mime-type="image/png"/></draw:frame></text:p>
      <text:p text:style-name="P44"/>
      <text:p text:style-name="P44"/>
      <text:p text:style-name="P44"><draw:frame draw:style-name="fr3" draw:name="Зображення14" text:anchor-type="char" svg:width="16.425cm" svg:height="6.625cm" draw:z-index="13"><draw:image xlink:href="Pictures/100000010000030800000139D4D779C1.png" xlink:type="simple" xlink:show="embed" xlink:actuate="onLoad" draw:mime-type="image/png"/></draw:frame><text:soft-page-break/></text:p>
      <text:p text:style-name="P44"/>
      <text:p text:style-name="P44">Аналіз вмісту образу:</text:p>
      <text:p text:style-name="P45">Щоб розібратися, з чого складається наш жирний образ, ми подивилися список файлів у робочій папці:</text:p>
      <text:p text:style-name="P45">docker run --rm go-lab:single ls -la</text:p>
      <text:p text:style-name="P45">У списку видно сам готовий бінарник `main` (він важить близько 10.8 МБ), вихідний код `main.go`, папки `cmd`, `lib`, `templates` та файли залежностей `go.mod` і `go.sum`. Також ми перевірили корінь усього контейнера: docker run --rm go-lab:single ls -la / Там висвітився повний набір стандартних папок системи Linux Debian (bin, boot, dev, etc, root, usr і т.д.).</text:p>
      <text:p text:style-name="P45">Висновок: Для роботи програми всі ці файли не потрібні. ОС Debian та інструменти розробника Go потрібні були лише для того, щоб скомпілювати код. В результаті вони просто так лежать в образі й роздувають його розмір до 1.33 ГБ. </text:p>
      <text:p text:style-name="P44"/>
      <text:p text:style-name="P44">#2. Багатоетапна збірка за допомогою порожнього образу (scratch)</text:p>
      <text:p text:style-name="P44">Для оптимізації переписуємо Dockerfile на два етапи. На першому (AS builder) ми компілюємо статичний бінарний файл, а на другому — переносимо тільки його в повністю порожній образ `FROM scratch`:</text:p>
      <text:p text:style-name="P44"/>
      <text:p text:style-name="P44">FROM golang:1.22-bookworm AS builder</text:p>
      <text:p text:style-name="P44">WORKDIR /app</text:p>
      <text:p text:style-name="P44">COPY . .</text:p>
      <text:p text:style-name="P44"><text:soft-page-break/>RUN CGO_ENABLED=0 GOOS=linux go build -o main .</text:p>
      <text:p text:style-name="P44"/>
      <text:p text:style-name="P44">FROM scratch</text:p>
      <text:p text:style-name="P44">COPY --from=builder /app/main /main</text:p>
      <text:p text:style-name="P44">CMD ["/main"]</text:p>
      <text:p text:style-name="P44"/>
      <text:p text:style-name="P44">Запуск збирання:</text:p>
      <text:p text:style-name="P44">time docker build --no-cache -t go-lab:scratch .</text:p>
      <text:p text:style-name="P44"/>
      <text:p text:style-name="P44">Результати збірки зі scratch:</text:p>
      <text:p text:style-name="P44"><draw:frame draw:style-name="fr1" draw:name="Зображення15" text:anchor-type="char" svg:x="0.252cm" svg:y="-0.134cm" svg:width="5.355cm" svg:height="1.588cm" draw:z-index="14"><draw:image xlink:href="Pictures/10000001000000FD0000004BB85AB8E4.png" xlink:type="simple" xlink:show="embed" xlink:actuate="onLoad" draw:mime-type="image/png"/></draw:frame></text:p>
      <text:p text:style-name="P44"/>
      <text:p text:style-name="P44"/>
      <text:p text:style-name="P44">Створюємо тимчасовий контейнер (без запуску):</text:p>
      <text:p text:style-name="P44"/>
      <text:p text:style-name="P46"><text:span text:style-name="Source_20_Text"><text:span text:style-name="T14">docker create --name test-scratch go-lab:scratch</text:span></text:span></text:p>
      <text:p text:style-name="P47">Дивимося список файлів всередині цього контейнера:</text:p>
      <text:p text:style-name="P47"/>
      <text:p text:style-name="P48"><text:span text:style-name="Source_20_Text"><text:span text:style-name="T14">docker export test-scratch | tar -t</text:span></text:span></text:p>
      <text:p text:style-name="P44"/>
      <text:p text:style-name="P44"/>
      <text:p text:style-name="P44"><draw:frame draw:style-name="fr1" draw:name="Зображення16" text:anchor-type="char" svg:x="-0.18cm" svg:y="-0.183cm" svg:width="5.906cm" svg:height="6.816cm" draw:z-index="15"><draw:image xlink:href="Pictures/10000001000001170000014203A208E1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9"><text:soft-page-break/><text:span text:style-name="T18">П</text:span>апки <text:span text:style-name="Source_20_Text"><text:span text:style-name="T19">dev</text:span></text:span>, <text:span text:style-name="Source_20_Text"><text:span text:style-name="T19">etc</text:span></text:span>, <text:span text:style-name="Source_20_Text"><text:span text:style-name="T19">proc</text:span></text:span> створює сам Docker автоматично в момент запуску контейнера. Вони потрібні для базових речей: ізоляції процесів (<text:span text:style-name="Source_20_Text"><text:span text:style-name="T19">proc</text:span></text:span>), роботи віртуальних пристроїв (<text:span text:style-name="Source_20_Text"><text:span text:style-name="T19">dev</text:span></text:span>) та мережі (<text:span text:style-name="Source_20_Text"><text:span text:style-name="T19">etc/hosts</text:span></text:span> і <text:span text:style-name="Source_20_Text"><text:span text:style-name="T19">resolv.conf</text:span></text:span> для роботи DNS). Жодного файлу самої операційної системи Linux там немає - з нашого проєкту туди потрапив лише файл <text:span text:style-name="Source_20_Text"><text:span text:style-name="T19">main</text:span></text:span>. </text:p>
      <text:p text:style-name="P44"/>
      <text:p text:style-name="P44"><draw:frame draw:style-name="fr4" draw:name="Зображення17" text:anchor-type="char" svg:width="16.872cm" svg:height="1.228cm" draw:z-index="16"><draw:image xlink:href="Pictures/100000010000031D0000003A021C045C.png" xlink:type="simple" xlink:show="embed" xlink:actuate="onLoad" draw:mime-type="image/png"/></draw:frame></text:p>
      <text:p text:style-name="P44">Відповіді на запитання щодо scratch:</text:p>
      <text:p text:style-name="P44">1. Чи достатньо файлів для запуску? Так, цілком достатньо. Мова Go збирає код у самодостатній бінарник, якому для роботи не потрібні зовнішні системні бібліотеки чи інтерпретатори.</text:p>
      <text:p text:style-name="P44">2. Чи зручно таким образом користуватися? З точки зору деплою і швидкості - <text:s/>дуже зручно, бо образ важить лічені мегабайти і миттєво завантажується на сервер.</text:p>
      <text:p text:style-name="P44">3. Чи зручно виконувати дії/налагодження всередині контейнера? Вкрай незручно. Оскільки образ `scratch` абсолютно порожній, всередині нього немає командного процесора (ні `sh`, ні `bash`), немає утиліт типу `ls`, `cat` чи `ping`. Якщо підключитися всередину запущеного контейнера через `docker exec -it`, система видасть помилку, бо там банально нема чого запускати. Налагоджувати такий контейнер "на гарячу" неможливо.</text:p>
      <text:p text:style-name="P50"/>
      <text:p text:style-name="P50"># <text:span text:style-name="T20">3</text:span>. Багатоетапна збірка з використанням образу Distroless</text:p>
      <text:p text:style-name="P50">Для вирішення проблем безпеки та сумісності, замість повністю порожнього `scratch` було використано спеціалізований образ від Google — `gcr.io/distroless/static-debian12`. У ньому немає операційної системи, але є кореневі сертифікати та налаштування часу.</text:p>
      <text:p text:style-name="P50"/>
      <text:p text:style-name="P50">Dockerfile було змінено таким чином:</text:p>
      <text:p text:style-name="P50"/>
      <text:p text:style-name="P50">FROM golang:1.22-bookworm AS builder</text:p>
      <text:p text:style-name="P50">WORKDIR /app</text:p>
      <text:p text:style-name="P50"><text:soft-page-break/>COPY . .</text:p>
      <text:p text:style-name="P50">RUN CGO_ENABLED=0 GOOS=linux go build -o main .</text:p>
      <text:p text:style-name="P50"/>
      <text:p text:style-name="P50">FROM gcr.io/distroless/static-debian12</text:p>
      <text:p text:style-name="P50">COPY --from=builder /app/main /main</text:p>
      <text:p text:style-name="P50">CMD ["/main"]</text:p>
      <text:p text:style-name="P50"/>
      <text:p text:style-name="P50">Запуск збирання:</text:p>
      <text:p text:style-name="P50">time docker build --no-cache -t go-lab:distroless .</text:p>
      <text:p text:style-name="P50"/>
      <text:p text:style-name="P50">Результати збірки з Distroless:</text:p>
      <text:p text:style-name="P50"><draw:frame draw:style-name="fr1" draw:name="Зображення18" text:anchor-type="char" svg:x="0.097cm" svg:y="0.021cm" svg:width="4.551cm" svg:height="1.63cm" draw:z-index="17"><draw:image xlink:href="Pictures/10000001000000D70000004D1AA4968F.png" xlink:type="simple" xlink:show="embed" xlink:actuate="onLoad" draw:mime-type="image/png"/></draw:frame></text:p>
      <text:p text:style-name="P50"/>
      <text:p text:style-name="P50"/>
      <text:p text:style-name="P51"><draw:frame draw:style-name="fr2" draw:name="Зображення19" text:anchor-type="char" svg:width="17cm" svg:height="1.132cm" draw:z-index="18"><draw:image xlink:href="Pictures/10000001000003660000003AA900821A.png" xlink:type="simple" xlink:show="embed" xlink:actuate="onLoad" draw:mime-type="image/png"/></draw:frame></text:p>
      <text:p text:style-name="P50">Створюємо тимчасовий контейнер:</text:p>
      <text:p text:style-name="P52"><text:span text:style-name="Source_20_Text"><text:span text:style-name="T21">docker create --name test-distroless go-lab:distroless</text:span></text:span></text:p>
      <text:p text:style-name="P53"><text:span text:style-name="Source_20_Text"><text:span text:style-name="T21"/></text:span></text:p>
      <text:p text:style-name="P53">Дивимося файли:</text:p>
      <text:p text:style-name="P52"><text:span text:style-name="Source_20_Text"><text:span text:style-name="T21">docker export test-distroless | tar -t</text:span></text:span></text:p>
      <text:p text:style-name="P50"/>
      <text:p text:style-name="P50">.dockerenv</text:p>
      <text:p text:style-name="P50">bin/</text:p>
      <text:p text:style-name="P50">boot/</text:p>
      <text:p text:style-name="P50">dev/</text:p>
      <text:p text:style-name="P50">dev/console</text:p>
      <text:p text:style-name="P50">dev/pts/</text:p>
      <text:p text:style-name="P50"><text:soft-page-break/>dev/shm/</text:p>
      <text:p text:style-name="P50">etc/</text:p>
      <text:p text:style-name="P50">etc/debian_version</text:p>
      <text:p text:style-name="P50">etc/default/</text:p>
      <text:p text:style-name="P50">etc/dpkg/</text:p>
      <text:p text:style-name="P50">etc/dpkg/origins/</text:p>
      <text:p text:style-name="P50">etc/dpkg/origins/debian</text:p>
      <text:p text:style-name="P50">etc/ethertypes</text:p>
      <text:p text:style-name="P50">etc/group</text:p>
      <text:p text:style-name="P50">etc/host.conf</text:p>
      <text:p text:style-name="P50">etc/hostname</text:p>
      <text:p text:style-name="P50">etc/hosts</text:p>
      <text:p text:style-name="P50">etc/issue</text:p>
      <text:p text:style-name="P50">etc/issue.net</text:p>
      <text:p text:style-name="P50">etc/mime.types</text:p>
      <text:p text:style-name="P50">etc/mtab</text:p>
      <text:p text:style-name="P50">etc/nsswitch.conf</text:p>
      <text:p text:style-name="P50">etc/os-release</text:p>
      <text:p text:style-name="P50">etc/passwd</text:p>
      <text:p text:style-name="P50">etc/profile.d/</text:p>
      <text:p text:style-name="P50">etc/protocols</text:p>
      <text:p text:style-name="P50">etc/resolv.conf</text:p>
      <text:p text:style-name="P50">etc/rpc</text:p>
      <text:p text:style-name="P50">etc/services</text:p>
      <text:p text:style-name="P50">etc/skel/</text:p>
      <text:p text:style-name="P50">etc/ssl/</text:p>
      <text:p text:style-name="P50">etc/ssl/certs/</text:p>
      <text:p text:style-name="P50">etc/ssl/certs/ca-certificates.crt</text:p>
      <text:p text:style-name="P50"><text:soft-page-break/>etc/update-motd.d/</text:p>
      <text:p text:style-name="P50">etc/update-motd.d/10-uname</text:p>
      <text:p text:style-name="P50">home/</text:p>
      <text:p text:style-name="P50">home/nonroot/</text:p>
      <text:p text:style-name="P50">lib/</text:p>
      <text:p text:style-name="P50">main</text:p>
      <text:p text:style-name="P50">proc/</text:p>
      <text:p text:style-name="P50">root/</text:p>
      <text:p text:style-name="P50">run/</text:p>
      <text:p text:style-name="P50">sbin/</text:p>
      <text:p text:style-name="P50">sys/</text:p>
      <text:p text:style-name="P50">tmp/</text:p>
      <text:p text:style-name="P50">usr/</text:p>
      <text:p text:style-name="P50">usr/bin/</text:p>
      <text:p text:style-name="P50">usr/games/</text:p>
      <text:p text:style-name="P50">usr/include/</text:p>
      <text:p text:style-name="P50">usr/lib/</text:p>
      <text:p text:style-name="P50">usr/lib/os-release</text:p>
      <text:p text:style-name="P50">usr/sbin/</text:p>
      <text:p text:style-name="P50">usr/share/</text:p>
      <text:p text:style-name="P50">usr/share/base-files/</text:p>
      <text:p text:style-name="P50">usr/share/base-files/dot.bashrc</text:p>
      <text:p text:style-name="P50">usr/share/base-files/dot.profile</text:p>
      <text:p text:style-name="P50">usr/share/base-files/dot.profile.md5sums</text:p>
      <text:p text:style-name="P50">usr/share/base-files/info.dir</text:p>
      <text:p text:style-name="P50">usr/share/base-files/motd</text:p>
      <text:p text:style-name="P50">usr/share/base-files/profile</text:p>
      <text:p text:style-name="P50">usr/share/base-files/profile.md5sums</text:p>
      <text:p text:style-name="P50"><text:soft-page-break/>usr/share/base-files/staff-group-for-usr-local</text:p>
      <text:p text:style-name="P50">usr/share/bug/</text:p>
      <text:p text:style-name="P50">usr/share/bug/media-types/</text:p>
      <text:p text:style-name="P50">usr/share/bug/media-types/presubj</text:p>
      <text:p text:style-name="P50">usr/share/common-licenses/</text:p>
      <text:p text:style-name="P50">usr/share/common-licenses/Apache-2.0</text:p>
      <text:p text:style-name="P50">usr/share/common-licenses/Artistic</text:p>
      <text:p text:style-name="P50">usr/share/common-licenses/BSD</text:p>
      <text:p text:style-name="P50">usr/share/common-licenses/CC0-1.0</text:p>
      <text:p text:style-name="P50">usr/share/common-licenses/GFDL</text:p>
      <text:p text:style-name="P50">usr/share/common-licenses/GFDL-1.2</text:p>
      <text:p text:style-name="P50">usr/share/common-licenses/GFDL-1.3</text:p>
      <text:p text:style-name="P50">usr/share/common-licenses/GPL</text:p>
      <text:p text:style-name="P50">usr/share/common-licenses/GPL-1</text:p>
      <text:p text:style-name="P50">usr/share/common-licenses/GPL-2</text:p>
      <text:p text:style-name="P50">usr/share/common-licenses/GPL-3</text:p>
      <text:p text:style-name="P50">usr/share/common-licenses/LGPL</text:p>
      <text:p text:style-name="P50">usr/share/common-licenses/LGPL-2</text:p>
      <text:p text:style-name="P50">usr/share/common-licenses/LGPL-2.1</text:p>
      <text:p text:style-name="P50">usr/share/common-licenses/LGPL-3</text:p>
      <text:p text:style-name="P50">usr/share/common-licenses/MPL-1.1</text:p>
      <text:p text:style-name="P50">usr/share/common-licenses/MPL-2.0</text:p>
      <text:p text:style-name="P50">usr/share/dict/</text:p>
      <text:p text:style-name="P50">usr/share/doc/</text:p>
      <text:p text:style-name="P50">usr/share/doc/base-files/</text:p>
      <text:p text:style-name="P50">usr/share/doc/base-files/FAQ</text:p>
      <text:p text:style-name="P50">usr/share/doc/base-files/README</text:p>
      <text:p text:style-name="P50">usr/share/doc/base-files/README.FHS</text:p>
      <text:p text:style-name="P50"><text:soft-page-break/>usr/share/doc/base-files/changelog.gz</text:p>
      <text:p text:style-name="P50">usr/share/doc/base-files/copyright</text:p>
      <text:p text:style-name="P50">usr/share/doc/ca-certificates/</text:p>
      <text:p text:style-name="P50">usr/share/doc/ca-certificates/copyright</text:p>
      <text:p text:style-name="P50">usr/share/doc/media-types/</text:p>
      <text:p text:style-name="P50">usr/share/doc/media-types/changelog.gz</text:p>
      <text:p text:style-name="P50">usr/share/doc/media-types/copyright</text:p>
      <text:p text:style-name="P50">usr/share/doc/netbase/</text:p>
      <text:p text:style-name="P50">usr/share/doc/netbase/changelog.gz</text:p>
      <text:p text:style-name="P50">usr/share/doc/netbase/copyright</text:p>
      <text:p text:style-name="P50">usr/share/doc/tzdata/</text:p>
      <text:p text:style-name="P50">usr/share/doc/tzdata/README.Debian</text:p>
      <text:p text:style-name="P50">usr/share/doc/tzdata/changelog.Debian.gz</text:p>
      <text:p text:style-name="P50">usr/share/doc/tzdata/changelog.gz</text:p>
      <text:p text:style-name="P50">usr/share/doc/tzdata/copyright</text:p>
      <text:p text:style-name="P50">usr/share/info/</text:p>
      <text:p text:style-name="P50">usr/share/lintian/</text:p>
      <text:p text:style-name="P50">usr/share/lintian/overrides/</text:p>
      <text:p text:style-name="P50">usr/share/lintian/overrides/base-files</text:p>
      <text:p text:style-name="P50">usr/share/lintian/overrides/tzdata</text:p>
      <text:p text:style-name="P50">usr/share/man/</text:p>
      <text:p text:style-name="P50">usr/share/misc/</text:p>
      <text:p text:style-name="P50">usr/share/zoneinfo/</text:p>
      <text:p text:style-name="P50">usr/share/zoneinfo/Africa/</text:p>
      <text:p text:style-name="P50">usr/share/zoneinfo/Africa/Abidjan</text:p>
      <text:p text:style-name="P50">usr/share/zoneinfo/Africa/Accra</text:p>
      <text:p text:style-name="P50">usr/share/zoneinfo/Africa/Addis_Ababa</text:p>
      <text:p text:style-name="P54">і т.д</text:p>
      <text:p text:style-name="P55"><text:soft-page-break/>Аналіз вмісту образу Distroless:</text:p>
      <text:p text:style-name="P55">По логах чітко видно, що окрім нашого бінарника <text:span text:style-name="Source_20_Text"><text:span text:style-name="T19">main</text:span></text:span>, всередині з'явилися дуже важливі системні файли, яких не було в <text:span text:style-name="Source_20_Text"><text:span text:style-name="T19">scratch</text:span></text:span>:</text:p>
      <text:list text:style-name="L3">
        <text:list-item>
          <text:p text:style-name="P56"><text:span text:style-name="Source_20_Text"><text:span text:style-name="T21">etc/ssl/certs/ca-certificates.crt</text:span></text:span><text:span text:style-name="T10"> — кореневі сертифікати безпеки. Без них наша програма не змогла б робити безпечні запити в інтернет (наприклад, викликати сторонні API по HTTPS).</text:span></text:p>
        </text:list-item>
        <text:list-item>
          <text:p text:style-name="P57"><text:span text:style-name="Source_20_Text"><text:span text:style-name="T21">usr/share/zoneinfo/</text:span></text:span><text:span text:style-name="T10"> — величезна база даних таймзон (від Африки до Європи/Kyiv). Вона потрібна, щоб програма всередині контейнера правильно розуміла локальний час.</text:span></text:p>
        </text:list-item>
        <text:list-item>
          <text:p text:style-name="P57"><text:span text:style-name="Source_20_Text"><text:span text:style-name="T21">etc/passwd</text:span></text:span><text:span text:style-name="T10"> та </text:span><text:span text:style-name="Source_20_Text"><text:span text:style-name="T21">home/nonroot/</text:span></text:span><text:span text:style-name="T10"> — налаштування користувачів. Контейнери Distroless за замовчуванням дозволяють запускати софт не від імені суперкористувача (</text:span><text:span text:style-name="Source_20_Text"><text:span text:style-name="T21">root</text:span></text:span><text:span text:style-name="T10">), а від безпечного користувача </text:span><text:span text:style-name="Source_20_Text"><text:span text:style-name="T21">nonroot</text:span></text:span><text:span text:style-name="T10">.</text:span></text:p>
        </text:list-item>
      </text:list>
      <text:p text:style-name="P58"><text:span text:style-name="T10">При цьому в образі немає жодних утиліт Лінукса, немає компіляторів і немає командної оболонки (</text:span><text:span text:style-name="Source_20_Text"><text:span text:style-name="T21">sh</text:span></text:span><text:span text:style-name="T10">/</text:span><text:span text:style-name="Source_20_Text"><text:span text:style-name="T21">bash</text:span></text:span><text:span text:style-name="T10">).</text:span></text:p>
      <text:h text:style-name="P59" text:outline-level="3"/>
      <text:h text:style-name="P60" text:outline-level="3">Порівняння з минулими етапами:</text:h>
      <text:h text:style-name="P61" text:outline-level="3"><text:span text:style-name="T22">- </text:span><text:span text:style-name="T16">Розмір образу: Він вийшов зовсім трохи більшим за </text:span><text:span text:style-name="Source_20_Text"><text:span text:style-name="T14">scratch</text:span></text:span><text:span text:style-name="T16"> (десь на 6 Мегабайт: 22.8 МБ проти 16.7 МБ), але все одно залишається крихітним порівняно з гігабайтним Debian Bookworm (який у нас заважив аж 1.33 ГБ).</text:span></text:h>
      <text:h text:style-name="P61" text:outline-level="3"><text:span text:style-name="T23">- </text:span><text:span text:style-name="T16">Зручність та адміністрування: У плані адміністрування тут ситуація така ж, як і зі </text:span><text:span text:style-name="Source_20_Text"><text:span text:style-name="T14">scratch</text:span></text:span><text:span text:style-name="T16">. Усередині Distroless немає командної оболонки </text:span><text:span text:style-name="Source_20_Text"><text:span text:style-name="T14">sh</text:span></text:span><text:span text:style-name="T16"> або </text:span><text:span text:style-name="Source_20_Text"><text:span text:style-name="T14">bash</text:span></text:span><text:span text:style-name="T16">, тому виконати </text:span><text:span text:style-name="Source_20_Text"><text:span text:style-name="T14">docker exec</text:span></text:span><text:span text:style-name="T16"> і зайти всередину контейнера для перевірки файлів неможливо.</text:span></text:h>
      <text:p text:style-name="P58"><text:span text:style-name="T16">Висновок: Образи Distroless є найкращим вибором для продакшену. Вони дають таку ж екологічність та мінімальну вагу, як і </text:span><text:span text:style-name="Source_20_Text"><text:span text:style-name="T14">scratch</text:span></text:span><text:span text:style-name="T16">, але додають критично важливі для реальних програм речі (наприклад, SSL-сертифікати для роботи з інтернетом та налаштування таймзон), при цьому не засмічуючи контейнер зайвим софтом.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7T13:57:38.904273400</meta:creation-date>
    <dc:date>2026-05-17T19:43:41.395760700</dc:date>
    <meta:editing-duration>PT5H35M30S</meta:editing-duration>
    <meta:editing-cycles>41</meta:editing-cycles>
    <meta:generator>LibreOffice/25.8.6.2$Windows_X86_64 LibreOffice_project/b4b39682cd9868fa725bc664aff94278d315bd04</meta:generator>
    <meta:document-statistic meta:table-count="1" meta:image-count="19" meta:object-count="0" meta:page-count="19" meta:paragraph-count="321" meta:word-count="2174" meta:character-count="17840" meta:non-whitespace-character-count="15948"/>
  </office:meta>
</office:document-meta>
</file>